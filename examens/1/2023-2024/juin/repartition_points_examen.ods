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1.9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euille2.B1">
          <table:error-message table:message-type="stop" table:display="true"/>
        </table:content-validation>
        <table:content-validation table:name="val2" table:condition="of:cell-content-is-in-list(&quot;Calcul mental&quot;;&quot;Diviseurs et multiples&quot;;&quot;Traitement de données&quot;;&quot;Entiers&quot;;&quot;Transformation du plan&quot;;&quot;Figures planes&quot;;&quot;Calcul littéral&quot;;&quot;Dénombrement et équations&quot;;&quot;Proportionnalité&quot;;&quot;Mix&quot;;&quot;&quot;)" table:allow-empty-cell="true" table:display-list="unsorted" table:base-cell-address="Feuille2.B2">
          <table:error-message table:message-type="stop" table:display="true"/>
        </table:content-validation>
        <table:content-validation table:name="val3" table:condition="of:cell-content-is-in-list(&quot;Calcul mental&quot;;&quot;Diviseurs et multiples&quot;;&quot;Traitement de données&quot;;&quot;Entiers&quot;;&quot;Transformation du plan&quot;;&quot;Figures planes&quot;;&quot;Calcul littéral&quot;;&quot;Dénombrement et équations&quot;;&quot;Proportionnalité&quot;;&quot;Mix&quot;;&quot;&quot;)" table:allow-empty-cell="true" table:display-list="unsorted" table:base-cell-address="Feuille2.B4">
          <table:error-message table:message-type="stop" table:display="true"/>
        </table:content-validation>
      </table:content-validations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estion</text:p>
          </table:table-cell>
          <table:table-cell table:content-validation-name="val1" office:value-type="string" calcext:value-type="string">
            <text:p>Chapitre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content-validation-name="val3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content-validation-name="val2" office:value-type="string" calcext:value-type="string">
            <text:p>M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content-validation-name="val2" office:value-type="string" calcext:value-type="string">
            <text:p>Calcul men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content-validation-name="val2" office:value-type="string" calcext:value-type="string">
            <text:p>Enti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content-validation-name="val2" office:value-type="string" calcext:value-type="string">
            <text:p>Enti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content-validation-name="val2" office:value-type="string" calcext:value-type="string">
            <text:p>Proportionnali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20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table:content-validation-name="val2" office:value-type="string" calcext:value-type="string">
            <text:p>Figures pla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23</text:p>
          </table:table-cell>
          <table:table-cell table:content-validation-name="val2" office:value-type="string" calcext:value-type="string">
            <text:p>Dénombrement et équati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4</text:p>
          </table:table-cell>
          <table:table-cell table:content-validation-name="val2" office:value-type="string" calcext:value-type="string">
            <text:p>Traitement de donn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5</text:p>
          </table:table-cell>
          <table:table-cell table:content-validation-name="val2" office:value-type="string" calcext:value-type="string">
            <text:p>Calcul littér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6</text:p>
          </table:table-cell>
          <table:table-cell table:content-validation-name="val2" office:value-type="string" calcext:value-type="string">
            <text:p>Transformation du pl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7</text:p>
          </table:table-cell>
          <table:table-cell table:content-validation-name="val2" office:value-type="string" calcext:value-type="string">
            <text:p>Diviseurs et multi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8</text:p>
          </table:table-cell>
          <table:table-cell table:content-validation-name="val2" office:value-type="string" calcext:value-type="string">
            <text:p>Diviseurs et multip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29</text:p>
          </table:table-cell>
          <table:table-cell table:content-validation-name="val2" office:value-type="string" calcext:value-type="string">
            <text:p>Diviseurs et multipl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lcul mental</text:p>
          </table:table-cell>
          <table:table-cell table:formula="of:=SUMIF([Feuille2.$B$2:.$B$30];[.A1];[Feuille2.$C$2:.$C$30])" office:value-type="float" office:value="5" calcext:value-type="float">
            <text:p>5</text:p>
          </table:table-cell>
          <table:table-cell table:formula="of:=[.B1]/[.$B$11]*100" office:value-type="float" office:value="5.37634408602151" calcext:value-type="float">
            <text:p>5</text:p>
          </table:table-cell>
        </table:table-row>
        <table:table-row table:style-name="ro1">
          <table:table-cell office:value-type="string" calcext:value-type="string">
            <text:p>Diviseurs et multiples</text:p>
          </table:table-cell>
          <table:table-cell table:formula="of:=SUMIF([Feuille2.$B$2:.$B$30];[.A2];[Feuille2.$C$2:.$C$30])" office:value-type="float" office:value="4" calcext:value-type="float">
            <text:p>4</text:p>
          </table:table-cell>
          <table:table-cell table:formula="of:=[.B2]/[.$B$11]*100" office:value-type="float" office:value="4.30107526881721" calcext:value-type="float">
            <text:p>4</text:p>
          </table:table-cell>
        </table:table-row>
        <table:table-row table:style-name="ro1">
          <table:table-cell office:value-type="string" calcext:value-type="string">
            <text:p>Traitement de données</text:p>
          </table:table-cell>
          <table:table-cell table:formula="of:=SUMIF([Feuille2.$B$2:.$B$30];[.A3];[Feuille2.$C$2:.$C$30])" office:value-type="float" office:value="10" calcext:value-type="float">
            <text:p>10</text:p>
          </table:table-cell>
          <table:table-cell table:formula="of:=[.B3]/[.$B$11]*100" office:value-type="float" office:value="10.752688172043" calcext:value-type="float">
            <text:p>11</text:p>
          </table:table-cell>
        </table:table-row>
        <table:table-row table:style-name="ro1">
          <table:table-cell office:value-type="string" calcext:value-type="string">
            <text:p>Entiers</text:p>
          </table:table-cell>
          <table:table-cell table:formula="of:=SUMIF([Feuille2.$B$2:.$B$30];[.A4];[Feuille2.$C$2:.$C$30])" office:value-type="float" office:value="7" calcext:value-type="float">
            <text:p>7</text:p>
          </table:table-cell>
          <table:table-cell table:formula="of:=[.B4]/[.$B$11]*100" office:value-type="float" office:value="7.52688172043011" calcext:value-type="float">
            <text:p>8</text:p>
          </table:table-cell>
        </table:table-row>
        <table:table-row table:style-name="ro1">
          <table:table-cell office:value-type="string" calcext:value-type="string">
            <text:p>Transformation du plan</text:p>
          </table:table-cell>
          <table:table-cell table:formula="of:=SUMIF([Feuille2.$B$2:.$B$30];[.A5];[Feuille2.$C$2:.$C$30])" office:value-type="float" office:value="10" calcext:value-type="float">
            <text:p>10</text:p>
          </table:table-cell>
          <table:table-cell table:formula="of:=[.B5]/[.$B$11]*100" office:value-type="float" office:value="10.752688172043" calcext:value-type="float">
            <text:p>11</text:p>
          </table:table-cell>
        </table:table-row>
        <table:table-row table:style-name="ro1">
          <table:table-cell office:value-type="string" calcext:value-type="string">
            <text:p>Figures planes</text:p>
          </table:table-cell>
          <table:table-cell table:formula="of:=SUMIF([Feuille2.$B$2:.$B$30];[.A6];[Feuille2.$C$2:.$C$30])" office:value-type="float" office:value="14" calcext:value-type="float">
            <text:p>14</text:p>
          </table:table-cell>
          <table:table-cell table:formula="of:=[.B6]/[.$B$11]*100" office:value-type="float" office:value="15.0537634408602" calcext:value-type="float">
            <text:p>15</text:p>
          </table:table-cell>
        </table:table-row>
        <table:table-row table:style-name="ro1">
          <table:table-cell office:value-type="string" calcext:value-type="string">
            <text:p>Calcul littéral</text:p>
          </table:table-cell>
          <table:table-cell table:formula="of:=SUMIF([Feuille2.$B$2:.$B$30];[.A7];[Feuille2.$C$2:.$C$30])" office:value-type="float" office:value="21" calcext:value-type="float">
            <text:p>21</text:p>
          </table:table-cell>
          <table:table-cell table:formula="of:=[.B7]/[.$B$11]*100" office:value-type="float" office:value="22.5806451612903" calcext:value-type="float">
            <text:p>23</text:p>
          </table:table-cell>
        </table:table-row>
        <table:table-row table:style-name="ro1">
          <table:table-cell office:value-type="string" calcext:value-type="string">
            <text:p>Dénombrement et équations</text:p>
          </table:table-cell>
          <table:table-cell table:formula="of:=SUMIF([Feuille2.$B$2:.$B$30];[.A8];[Feuille2.$C$2:.$C$30])" office:value-type="float" office:value="4" calcext:value-type="float">
            <text:p>4</text:p>
          </table:table-cell>
          <table:table-cell table:formula="of:=[.B8]/[.$B$11]*100" office:value-type="float" office:value="4.30107526881721" calcext:value-type="float">
            <text:p>4</text:p>
          </table:table-cell>
        </table:table-row>
        <table:table-row table:style-name="ro1">
          <table:table-cell office:value-type="string" calcext:value-type="string">
            <text:p>Proportionnalité</text:p>
          </table:table-cell>
          <table:table-cell table:formula="of:=SUMIF([Feuille2.$B$2:.$B$30];[.A9];[Feuille2.$C$2:.$C$30])" office:value-type="float" office:value="4" calcext:value-type="float">
            <text:p>4</text:p>
          </table:table-cell>
          <table:table-cell table:formula="of:=[.B9]/[.$B$11]*100" office:value-type="float" office:value="4.30107526881721" calcext:value-type="float">
            <text:p>4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table:formula="of:=SUMIF([Feuille2.$B$2:.$B$30];[.A10];[Feuille2.$C$2:.$C$30])" office:value-type="float" office:value="14" calcext:value-type="float">
            <text:p>14</text:p>
          </table:table-cell>
          <table:table-cell table:formula="of:=[.B10]/[.$B$11]*100" office:value-type="float" office:value="15.0537634408602" calcext:value-type="float">
            <text:p>15</text:p>
          </table:table-cell>
        </table:table-row>
        <table:table-row table:style-name="ro1">
          <table:table-cell/>
          <table:table-cell table:formula="of:=SUM([.B1:.B10])" office:value-type="float" office:value="93" calcext:value-type="float">
            <text:p>9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0:19:04.621556380</meta:creation-date>
    <dc:date>2023-06-06T14:47:28.287331721</dc:date>
    <meta:editing-duration>PT1H41M43S</meta:editing-duration>
    <meta:editing-cycles>3</meta:editing-cycles>
    <meta:generator>LibreOffice/7.5.2.2$Linux_X86_64 LibreOffice_project/50$Build-2</meta:generator>
    <meta:document-statistic meta:table-count="2" meta:cell-count="121" meta:object-count="0"/>
  </office:meta>
</office:document-meta>
</file>