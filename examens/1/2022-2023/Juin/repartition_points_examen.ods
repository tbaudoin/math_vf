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811in"/>
    </style:style>
    <style:style style:name="co3" style:family="table-column">
      <style:table-column-properties fo:break-before="auto" style:column-width="1.913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base-cell-address="Feuille2.B1">
          <table:error-message table:message-type="stop" table:display="true"/>
        </table:content-validation>
        <table:content-validation table:name="val2" table:condition="of:cell-content-is-in-list(&quot;Calcul mental&quot;;&quot;Diviseurs et multiples&quot;;&quot;Traitement de données&quot;;&quot;Entiers&quot;;&quot;Transformation du plan&quot;;&quot;Figures planes&quot;;&quot;Calcul littéral&quot;;&quot;Dénombrement et équations&quot;;&quot;Proportionnalité&quot;;&quot;Mix&quot;;&quot;&quot;)" table:allow-empty-cell="true" table:display-list="unsorted" table:base-cell-address="Feuille2.B2">
          <table:error-message table:message-type="stop" table:display="true"/>
        </table:content-validation>
        <table:content-validation table:name="val3" table:condition="of:cell-content-is-in-list(&quot;Calcul mental&quot;;&quot;Diviseurs et multiples&quot;;&quot;Traitement de données&quot;;&quot;Entiers&quot;;&quot;Transformation du plan&quot;;&quot;Figures planes&quot;;&quot;Calcul littéral&quot;;&quot;Dénombrement et équations&quot;;&quot;Proportionnalité&quot;;&quot;Mix&quot;;&quot;&quot;)" table:allow-empty-cell="true" table:display-list="unsorted" table:base-cell-address="Feuille2.B4">
          <table:error-message table:message-type="stop" table:display="true"/>
        </table:content-validation>
      </table:content-validations>
      <table:table table:name="Feuille2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Question</text:p>
          </table:table-cell>
          <table:table-cell table:content-validation-name="val1" office:value-type="string" calcext:value-type="string">
            <text:p>Chapitres</text:p>
          </table:table-cell>
          <table:table-cell office:value-type="string" calcext:value-type="string">
            <text:p>Points</text:p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 table:content-validation-name="val2" office:value-type="string" calcext:value-type="string">
            <text:p>Mix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Q2</text:p>
          </table:table-cell>
          <table:table-cell table:content-validation-name="val2" office:value-type="string" calcext:value-type="string">
            <text:p>Mix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Q3</text:p>
          </table:table-cell>
          <table:table-cell table:content-validation-name="val3" office:value-type="string" calcext:value-type="string">
            <text:p>Calcul ment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4</text:p>
          </table:table-cell>
          <table:table-cell table:content-validation-name="val2" office:value-type="string" calcext:value-type="string">
            <text:p>Calcul ment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5</text:p>
          </table:table-cell>
          <table:table-cell table:content-validation-name="val2" office:value-type="string" calcext:value-type="string">
            <text:p>Mix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Q6</text:p>
          </table:table-cell>
          <table:table-cell table:content-validation-name="val2" office:value-type="string" calcext:value-type="string">
            <text:p>Calcul ment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7</text:p>
          </table:table-cell>
          <table:table-cell table:content-validation-name="val2" office:value-type="string" calcext:value-type="string">
            <text:p>Calcul menta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Q8</text:p>
          </table:table-cell>
          <table:table-cell table:content-validation-name="val2" office:value-type="string" calcext:value-type="string">
            <text:p>Transformation du pla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9</text:p>
          </table:table-cell>
          <table:table-cell table:content-validation-name="val2" office:value-type="string" calcext:value-type="string">
            <text:p>Entier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Q10</text:p>
          </table:table-cell>
          <table:table-cell table:content-validation-name="val2" office:value-type="string" calcext:value-type="string">
            <text:p>Entier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Q11</text:p>
          </table:table-cell>
          <table:table-cell table:content-validation-name="val2" office:value-type="string" calcext:value-type="string">
            <text:p>Calcul littéral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Q12</text:p>
          </table:table-cell>
          <table:table-cell table:content-validation-name="val2" office:value-type="string" calcext:value-type="string">
            <text:p>Calcul littéral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Q13</text:p>
          </table:table-cell>
          <table:table-cell table:content-validation-name="val2" office:value-type="string" calcext:value-type="string">
            <text:p>Proportionnalité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Q14</text:p>
          </table:table-cell>
          <table:table-cell table:content-validation-name="val2" office:value-type="string" calcext:value-type="string">
            <text:p>Figures plan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Q15</text:p>
          </table:table-cell>
          <table:table-cell table:content-validation-name="val2" office:value-type="string" calcext:value-type="string">
            <text:p>Figures plane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Q16</text:p>
          </table:table-cell>
          <table:table-cell table:content-validation-name="val2" office:value-type="string" calcext:value-type="string">
            <text:p>Calcul littéra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Q17</text:p>
          </table:table-cell>
          <table:table-cell table:content-validation-name="val2" office:value-type="string" calcext:value-type="string">
            <text:p>Figures plan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Q18</text:p>
          </table:table-cell>
          <table:table-cell table:content-validation-name="val2" office:value-type="string" calcext:value-type="string">
            <text:p>Traitement de donné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Q19</text:p>
          </table:table-cell>
          <table:table-cell table:content-validation-name="val2" office:value-type="string" calcext:value-type="string">
            <text:p>Transformation du pla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Q20</text:p>
          </table:table-cell>
          <table:table-cell table:content-validation-name="val2" office:value-type="string" calcext:value-type="string">
            <text:p>Transformation du pla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Q21</text:p>
          </table:table-cell>
          <table:table-cell table:content-validation-name="val2" office:value-type="string" calcext:value-type="string">
            <text:p>Figures plan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Q22</text:p>
          </table:table-cell>
          <table:table-cell table:content-validation-name="val2" office:value-type="string" calcext:value-type="string">
            <text:p>Traitement de donné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Q23</text:p>
          </table:table-cell>
          <table:table-cell table:content-validation-name="val2" office:value-type="string" calcext:value-type="string">
            <text:p>Dénombrement et équation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Q24</text:p>
          </table:table-cell>
          <table:table-cell table:content-validation-name="val2" office:value-type="string" calcext:value-type="string">
            <text:p>Traitement de donné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Q25</text:p>
          </table:table-cell>
          <table:table-cell table:content-validation-name="val2" office:value-type="string" calcext:value-type="string">
            <text:p>Calcul littéral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Q26</text:p>
          </table:table-cell>
          <table:table-cell table:content-validation-name="val2" office:value-type="string" calcext:value-type="string">
            <text:p>Transformation du plan</text:p>
          </table:table-cell>
          <table:table-cell office:value-type="float" office:value="4" calcext:value-type="float">
            <text:p>4</text:p>
          </table:table-cell>
        </table:table-row>
      </table:table>
      <table:table table:name="Sheet2" table:style-name="ta1"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Calcul mental</text:p>
          </table:table-cell>
          <table:table-cell table:formula="of:=SUMIF([Feuille2.$B$2:.$B$27];[.A1];[Feuille2.$C$2:.$C$27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iviseurs et multiples</text:p>
          </table:table-cell>
          <table:table-cell table:formula="of:=SUMIF([Feuille2.$B$2:.$B$27];[.A2];[Feuille2.$C$2:.$C$2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aitement de données</text:p>
          </table:table-cell>
          <table:table-cell table:formula="of:=SUMIF([Feuille2.$B$2:.$B$27];[.A3];[Feuille2.$C$2:.$C$27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ntiers</text:p>
          </table:table-cell>
          <table:table-cell table:formula="of:=SUMIF([Feuille2.$B$2:.$B$27];[.A4];[Feuille2.$C$2:.$C$27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ransformation du plan</text:p>
          </table:table-cell>
          <table:table-cell table:formula="of:=SUMIF([Feuille2.$B$2:.$B$27];[.A5];[Feuille2.$C$2:.$C$27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igures planes</text:p>
          </table:table-cell>
          <table:table-cell table:formula="of:=SUMIF([Feuille2.$B$2:.$B$27];[.A6];[Feuille2.$C$2:.$C$27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Calcul littéral</text:p>
          </table:table-cell>
          <table:table-cell table:formula="of:=SUMIF([Feuille2.$B$2:.$B$27];[.A7];[Feuille2.$C$2:.$C$27])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Dénombrement et équations</text:p>
          </table:table-cell>
          <table:table-cell table:formula="of:=SUMIF([Feuille2.$B$2:.$B$27];[.A8];[Feuille2.$C$2:.$C$27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oportionnalité</text:p>
          </table:table-cell>
          <table:table-cell table:formula="of:=SUMIF([Feuille2.$B$2:.$B$27];[.A9];[Feuille2.$C$2:.$C$27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ix</text:p>
          </table:table-cell>
          <table:table-cell table:formula="of:=SUMIF([Feuille2.$B$2:.$B$27];[.A10];[Feuille2.$C$2:.$C$27])" office:value-type="float" office:value="14" calcext:value-type="float">
            <text:p>14</text:p>
          </table:table-cell>
        </table:table-row>
        <table:table-row table:style-name="ro1">
          <table:table-cell/>
          <table:table-cell table:formula="of:=SUM([.B1:.B10])" office:value-type="float" office:value="89" calcext:value-type="float">
            <text:p>8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fr" fo:country="BE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6T10:19:04.621556380</meta:creation-date>
    <dc:date>2023-06-06T11:17:59.160109133</dc:date>
    <meta:editing-duration>PT25M7S</meta:editing-duration>
    <meta:editing-cycles>2</meta:editing-cycles>
    <meta:generator>LibreOffice/7.5.2.2$Linux_X86_64 LibreOffice_project/50$Build-2</meta:generator>
    <meta:document-statistic meta:table-count="2" meta:cell-count="102" meta:object-count="0"/>
  </office:meta>
</office:document-meta>
</file>