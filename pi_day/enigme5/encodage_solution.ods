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3" style:family="table-cell" style:parent-style-name="Default">
      <style:map style:condition="is-true-formula(ISBLANK([.B2]))" style:apply-style-name="Default" style:base-cell-address="Feuille1.B2"/>
      <style:map style:condition="cell-content()=[.E2]" style:apply-style-name="Good" style:base-cell-address="Feuille1.B2"/>
      <style:map style:condition="cell-content()!=[.E2]" style:apply-style-name="Bad" style:base-cell-address="Feuille1.B2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3"/>
        <table:table-column table:style-name="co1" table:visibility="collapse" table:number-columns-repeated="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Figure</text:p>
          </table:table-cell>
          <table:table-cell table:style-name="ce1" office:value-type="string" calcext:value-type="string">
            <text:p>Réponse</text:p>
          </table:table-cell>
          <table:table-cell office:value-type="string" calcext:value-type="string">
            <text:p>Rayon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PI()*[.C2]*2" office:value-type="float" office:value="18.8495559215388" calcext:value-type="float">
            <text:p>18,8495559215388</text:p>
          </table:table-cell>
          <table:table-cell table:formula="of:=FLOOR(MOD([.D2];100))" office:value-type="float" office:value="18" calcext:value-type="float">
            <text:p>18</text:p>
          </table:table-cell>
          <table:table-cell/>
          <table:table-cell table:style-name="ce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PI()*[.C3]*2" office:value-type="float" office:value="37.6991118430775" calcext:value-type="float">
            <text:p>37,6991118430775</text:p>
          </table:table-cell>
          <table:table-cell table:formula="of:=FLOOR(MOD([.D3];100)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formula="of:=PI()*[.C4]*2" office:value-type="float" office:value="50.2654824574367" calcext:value-type="float">
            <text:p>50,2654824574367</text:p>
          </table:table-cell>
          <table:table-cell table:formula="of:=FLOOR(MOD([.D4];100)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formula="of:=PI()*[.C5]*2" office:value-type="float" office:value="31.4159265358979" calcext:value-type="float">
            <text:p>31,4159265358979</text:p>
          </table:table-cell>
          <table:table-cell table:formula="of:=FLOOR(MOD([.D5];100)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formula="of:=PI()*[.C6]*2" office:value-type="float" office:value="56.5486677646163" calcext:value-type="float">
            <text:p>56,5486677646163</text:p>
          </table:table-cell>
          <table:table-cell table:formula="of:=FLOOR(MOD([.D6];100)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formula="of:=PI()*[.C7]*2" office:value-type="float" office:value="12.5663706143592" calcext:value-type="float">
            <text:p>12,5663706143592</text:p>
          </table:table-cell>
          <table:table-cell table:formula="of:=FLOOR(MOD([.D7];100)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PI()*[.C8]*2" office:value-type="float" office:value="62.8318530717959" calcext:value-type="float">
            <text:p>62,8318530717959</text:p>
          </table:table-cell>
          <table:table-cell table:formula="of:=FLOOR(MOD([.D8];100)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table:formula="of:=PI()*[.C9]*2" office:value-type="float" office:value="43.9822971502571" calcext:value-type="float">
            <text:p>43,9822971502571</text:p>
          </table:table-cell>
          <table:table-cell table:formula="of:=FLOOR(MOD([.D9];100)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formula="of:=PI()*[.C10]*2" office:value-type="float" office:value="25.1327412287183" calcext:value-type="float">
            <text:p>25,1327412287183</text:p>
          </table:table-cell>
          <table:table-cell table:formula="of:=FLOOR(MOD([.D10];100)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formula="of:=PI()*[.C11]^2" office:value-type="float" office:value="12.5663706143592" calcext:value-type="float">
            <text:p>12,5663706143592</text:p>
          </table:table-cell>
          <table:table-cell table:formula="of:=FLOOR(MOD([.D11];100)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PI()*[.C12]^2" office:value-type="float" office:value="314.159265358979" calcext:value-type="float">
            <text:p>314,159265358979</text:p>
          </table:table-cell>
          <table:table-cell table:formula="of:=FLOOR(MOD([.D12];100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table:formula="of:=PI()*[.C13]^2" office:value-type="float" office:value="50.2654824574367" calcext:value-type="float">
            <text:p>50,2654824574367</text:p>
          </table:table-cell>
          <table:table-cell table:formula="of:=FLOOR(MOD([.D13];100)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formula="of:=PI()*[.C14]^2" office:value-type="float" office:value="113.097335529233" calcext:value-type="float">
            <text:p>113,097335529233</text:p>
          </table:table-cell>
          <table:table-cell table:formula="of:=FLOOR(MOD([.D14];100)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3" calcext:value-type="float">
            <text:p>3</text:p>
          </table:table-cell>
          <table:table-cell table:formula="of:=PI()*[.C15]^2" office:value-type="float" office:value="28.2743338823081" calcext:value-type="float">
            <text:p>28,2743338823081</text:p>
          </table:table-cell>
          <table:table-cell table:formula="of:=FLOOR(MOD([.D15];100)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table:formula="of:=PI()*[.C16]^2" office:value-type="float" office:value="78.5398163397448" calcext:value-type="float">
            <text:p>78,5398163397448</text:p>
          </table:table-cell>
          <table:table-cell table:formula="of:=FLOOR(MOD([.D16];100)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7" calcext:value-type="float">
            <text:p>7</text:p>
          </table:table-cell>
          <table:table-cell table:formula="of:=PI()*[.C17]^2" office:value-type="float" office:value="153.9380400259" calcext:value-type="float">
            <text:p>153,9380400259</text:p>
          </table:table-cell>
          <table:table-cell table:formula="of:=FLOOR(MOD([.D17];100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9" calcext:value-type="float">
            <text:p>9</text:p>
          </table:table-cell>
          <table:table-cell table:formula="of:=PI()*[.C18]^2" office:value-type="float" office:value="254.469004940773" calcext:value-type="float">
            <text:p>254,469004940773</text:p>
          </table:table-cell>
          <table:table-cell table:formula="of:=FLOOR(MOD([.D18];100)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8" calcext:value-type="float">
            <text:p>8</text:p>
          </table:table-cell>
          <table:table-cell table:formula="of:=PI()*[.C19]^2" office:value-type="float" office:value="201.061929829747" calcext:value-type="float">
            <text:p>201,061929829747</text:p>
          </table:table-cell>
          <table:table-cell table:formula="of:=FLOOR(MOD([.D19];100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7" calcext:value-type="float">
            <text:p>7</text:p>
          </table:table-cell>
          <table:table-cell table:formula="of:=PI()*[.C20]^3*0.75" office:value-type="float" office:value="808.174710135974" calcext:value-type="float">
            <text:p>808,174710135974</text:p>
          </table:table-cell>
          <table:table-cell table:formula="of:=FLOOR(MOD([.D20];100)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9" calcext:value-type="float">
            <text:p>9</text:p>
          </table:table-cell>
          <table:table-cell table:formula="of:=PI()*[.C21]^3*0.75" office:value-type="float" office:value="1717.66578335022" calcext:value-type="float">
            <text:p>1717,66578335022</text:p>
          </table:table-cell>
          <table:table-cell table:formula="of:=FLOOR(MOD([.D21];100)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4" calcext:value-type="float">
            <text:p>4</text:p>
          </table:table-cell>
          <table:table-cell table:formula="of:=PI()*[.C22]^3*0.75" office:value-type="float" office:value="150.79644737231" calcext:value-type="float">
            <text:p>150,79644737231</text:p>
          </table:table-cell>
          <table:table-cell table:formula="of:=FLOOR(MOD([.D22];100)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table:formula="of:=PI()*[.C23]^3*0.75" office:value-type="float" office:value="18.8495559215388" calcext:value-type="float">
            <text:p>18,8495559215388</text:p>
          </table:table-cell>
          <table:table-cell table:formula="of:=FLOOR(MOD([.D23];100)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3" calcext:value-type="float">
            <text:p>3</text:p>
          </table:table-cell>
          <table:table-cell table:formula="of:=PI()*[.C24]^3*0.75" office:value-type="float" office:value="63.6172512351933" calcext:value-type="float">
            <text:p>63,6172512351933</text:p>
          </table:table-cell>
          <table:table-cell table:formula="of:=FLOOR(MOD([.D24];100)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5" calcext:value-type="float">
            <text:p>5</text:p>
          </table:table-cell>
          <table:table-cell table:formula="of:=PI()*[.C25]^3*0.75" office:value-type="float" office:value="294.524311274043" calcext:value-type="float">
            <text:p>294,524311274043</text:p>
          </table:table-cell>
          <table:table-cell table:formula="of:=FLOOR(MOD([.D25];100))"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8" calcext:value-type="float">
            <text:p>8</text:p>
          </table:table-cell>
          <table:table-cell table:formula="of:=PI()*[.C26]^3*0.75" office:value-type="float" office:value="1206.37157897848" calcext:value-type="float">
            <text:p>1206,37157897848</text:p>
          </table:table-cell>
          <table:table-cell table:formula="of:=FLOOR(MOD([.D26];100)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DE </text:p>
          </table:table-cell>
          <table:table-cell table:style-name="ce4" table:formula="of:=SUM([.B2:.B26])" office:value-type="float" office:value="38" calcext:value-type="float">
            <text:p>38</text:p>
          </table:table-cell>
          <table:table-cell table:number-columns-repeated="2"/>
          <table:table-cell table:formula="of:=SUM([.E2:.E26])" office:value-type="float" office:value="893" calcext:value-type="float">
            <text:p>893</text:p>
          </table:table-cell>
          <table:table-cell table:number-columns-repeated="2"/>
        </table:table-row>
        <calcext:conditional-formats>
          <calcext:conditional-format calcext:target-range-address="Feuille1.B2:Feuille1.B26">
            <calcext:condition calcext:apply-style-name="Default" calcext:value="formula-is(ISBLANK([.B2]))" calcext:base-cell-address="Feuille1.B2"/>
            <calcext:condition calcext:apply-style-name="Good" calcext:value="=[.E2]" calcext:base-cell-address="Feuille1.B2"/>
            <calcext:condition calcext:apply-style-name="Bad" calcext:value="!=[.E2]" calcext:base-cell-address="Feuille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B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20:46:07.388849138</meta:creation-date>
    <dc:date>2023-03-09T21:05:24.655279063</dc:date>
    <meta:editing-duration>PT18M50S</meta:editing-duration>
    <meta:editing-cycles>2</meta:editing-cycles>
    <meta:generator>LibreOffice/7.5.0.3$Linux_X86_64 LibreOffice_project/50$Build-3</meta:generator>
    <meta:document-statistic meta:table-count="1" meta:cell-count="108" meta:object-count="0"/>
  </office:meta>
</office:document-meta>
</file>